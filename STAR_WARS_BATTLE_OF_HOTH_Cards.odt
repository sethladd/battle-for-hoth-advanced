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R WARS: <text:s/>BATTLE OF HOTH</text:p>
      <text:p text:style-name="P3">CARD COMPENDIUM</text:p>
      <text:p text:style-name="P3">By Chas</text:p>
      <text:p text:style-name="P3"/>
      <text:p text:style-name="P7">This list includes all 60 cards from the Core Box, with their functions. <text:s/>It also compares each of them line by line with the card in the opposite Player Deck that is most similar. <text:s/>For each pair, a Rebel card is given first, then the Imperial counterpart.“(NE)” indicates that the two cards compared are not at all equal. +1 Hex increases movement; +1 Die increases attack.</text:p>
      <text:p text:style-name="P7"/>
      <text:p text:style-name="P6">Section Cards (10/Side)</text:p>
      <text:p text:style-name="P1"/>
      <text:p text:style-name="P2">(Rebel) <text:s/><text:span text:style-name="T1">Assault</text:span> x3 <text:s/>All Units Left, Right, and Center</text:p>
      <text:p text:style-name="P2">(Imperial) <text:s/>Same</text:p>
      <text:p text:style-name="P2"/>
      <text:p text:style-name="P2"><text:span text:style-name="T1">Raid</text:span> x3 <text:s text:c="2"/>2 <text:s/>Units Left, Right, and Center</text:p>
      <text:p text:style-name="P2">Same</text:p>
      <text:p text:style-name="P2"/>
      <text:p text:style-name="P2"><text:span text:style-name="T1">Recon</text:span>: x3 <text:s/>1 Unit Left, Right, and Center</text:p>
      <text:p text:style-name="P2">Same</text:p>
      <text:p text:style-name="P2"/>
      <text:p text:style-name="P2">R<text:span text:style-name="T1">econ In Force</text:span> <text:s/>1 Unit Each Sector</text:p>
      <text:p text:style-name="P2"><text:span text:style-name="T1">Pincer Move</text:span> <text:s/>2 Units Each Flank</text:p>
      <text:p text:style-name="P2"/>
      <text:p text:style-name="P8">T<text:span text:style-name="T1">actics Cards (6/Side)</text:span></text:p>
      <text:p text:style-name="P1"/>
      <text:p text:style-name="P2"><text:span text:style-name="T1">Direct From HQ</text:span> <text:s/>Any 3 Units</text:p>
      <text:p text:style-name="P2">Same</text:p>
      <text:p text:style-name="P2"/>
      <text:p text:style-name="P2"><text:span text:style-name="T1">Trooper Assault</text:span> <text:s/>All infantry in 1 section +1 Die</text:p>
      <text:p text:style-name="P2"><text:span text:style-name="T1">Trooper Assault </text:span><text:s/>All infantry in 1 section</text:p>
      <text:p text:style-name="P2"/>
      <text:p text:style-name="P2"><text:span text:style-name="T1">Speeder Assault</text:span> 2 Vehicles move 1 after attack</text:p>
      <text:p text:style-name="P2"><text:span text:style-name="T1">Imperial Assault</text:span> 3 same type +1 Hex</text:p>
      <text:p text:style-name="P2"/>
      <text:p text:style-name="P2"><text:span text:style-name="T1">Artillery Barrage</text:span> <text:s/>1 Artillery attack twice +1 Die</text:p>
      <text:p text:style-name="P2"><text:span text:style-name="T1">Precision Fire</text:span> 1 Vehicle +1 Hex, +1 Die</text:p>
      <text:p text:style-name="P2"/>
      <text:p text:style-name="P2"><text:span text:style-name="T1">Defensive Position</text:span> 3 units no move, +1 Die</text:p>
      <text:p text:style-name="P2"><text:span text:style-name="T1">Search and Destroy</text:span> 2 units on attack move +2</text:p>
      <text:p text:style-name="P2"/>
      <text:p text:style-name="P2"><text:span text:style-name="T1">Rebel Spearhead</text:span> 2 units ignore terrain movement and attack restrictions </text:p>
      <text:p text:style-name="P2"><text:span text:style-name="T1">Pressing Forward</text:span> 2 units no attack, move +2</text:p>
      <text:p text:style-name="P2"/>
      <text:p text:style-name="P1">Deck Total: 16 Cards/Side</text:p>
      <text:p text:style-name="P1"/>
      <text:p text:style-name="P1"/>
      <text:p text:style-name="P1"/>
      <text:p text:style-name="P1"/>
      <text:p text:style-name="P1"/>
      <text:p text:style-name="P6"><text:soft-page-break/>General Cards (9/Side; 3 per Leader in named sets) </text:p>
      <text:p text:style-name="P2"/>
      <text:p text:style-name="P1">Princess Leia/Admiral Piet</text:p>
      <text:p text:style-name="P2"><text:span text:style-name="T1">Assistance</text:span> Reduced units +1 figure and Order one Unit.</text:p>
      <text:p text:style-name="P2"><text:span text:style-name="T1">Reinforcements</text:span> Bring 1 infantry to full strength and order it with +1 Die</text:p>
      <text:p text:style-name="P2"/>
      <text:p text:style-name="P5">Orders From The Princess <text:span text:style-name="T2">2 Units +1 Die</text:span></text:p>
      <text:p text:style-name="P5">(<text:span text:style-name="T2">NE)</text:span> Deploy The Fleet <text:span text:style-name="T2">Discard up to three cards, then draw that many plus one, and then play another card after this one.</text:span></text:p>
      <text:p text:style-name="P7"/>
      <text:p text:style-name="P5">Our Last Hope<text:span text:style-name="T2"> 1 Infantry unit +1 Hex, +1 D</text:span></text:p>
      <text:p text:style-name="P5"><text:span text:style-name="T2">(NE)</text:span> Orbital Strike <text:span text:style-name="T2">Roll 1 Die each against three enemy units. <text:s/>A corresponding Symbol, Blast, or Retreat counts as a Hit</text:span></text:p>
      <text:p text:style-name="P2"/>
      <text:p text:style-name="P1">Luke Skywalker/Lord Vader</text:p>
      <text:p text:style-name="P2"><text:span text:style-name="T1">In Formation</text:span> 2 Units +1 Hex</text:p>
      <text:p text:style-name="P2"><text:span text:style-name="T1">Force Powers</text:span> 2 Units Die Retreats count as Blasts</text:p>
      <text:p text:style-name="P2"/>
      <text:p text:style-name="P2"><text:span text:style-name="T1">Tactical Assault</text:span> 1 Vehicle +1 Hex, +1 Die</text:p>
      <text:p text:style-name="P2"><text:span text:style-name="T1">Determination</text:span> 1 Unit orders twice</text:p>
      <text:p text:style-name="P2"/>
      <text:p text:style-name="P2"><text:span text:style-name="T1">Ready For Battle </text:span>All Units Attack but Not Move</text:p>
      <text:p text:style-name="P2">Imperial Discipline All units ordered, -1 Die</text:p>
      <text:p text:style-name="P7">. </text:p>
      <text:p text:style-name="P11">Han Solo/General Veers</text:p>
      <text:p text:style-name="P7"><text:span text:style-name="T1">Diversion </text:span><text:s/>2 units in different sections +1 Die</text:p>
      <text:p text:style-name="P5">Walker Attack<text:span text:style-name="T2"> 3 Vehicle units +1 Die in close combat</text:span></text:p>
      <text:p text:style-name="P7"/>
      <text:p text:style-name="P5">Here They Come<text:span text:style-name="T2"> 1 Infantry unit +2 Hex and +1 Die; ignore terrain movement and attack restrictions.</text:span></text:p>
      <text:p text:style-name="P5">Successful Landings <text:span text:style-name="T2">3 units may move 1 hex after attacking.</text:span></text:p>
      <text:p text:style-name="P7"/>
      <text:p text:style-name="P5">Scoundrel's Support<text:span text:style-name="T2"> 1 Infantry unit +1 Die per friendly adjacent unit.</text:span></text:p>
      <text:p text:style-name="P5">Concentrated Fire <text:s/><text:span text:style-name="T2">Order</text:span> <text:span text:style-name="T2">3 units. <text:s/>If a second one attacks the same target, +1 Die. <text:s/>If a third attacks the same target, +2 Die.</text:span></text:p>
      <text:p text:style-name="P7"/>
      <text:p text:style-name="P5"><text:span text:style-name="T6">Campaign Cards (5/Side)</text:span><text:span text:style-name="T4"> </text:span><text:span text:style-name="T2"><text:s/>All (NE), in general order of effectiveness. <text:s/></text:span></text:p>
      <text:p text:style-name="P7"/>
      <text:p text:style-name="P4"><text:span text:style-name="T2">Rebel <text:s/></text:span><text:span text:style-name="T5">Combat Experience</text:span><text:span text:style-name="T3"> Activate all units; +1 Die in Close Combat for all. </text:span></text:p>
      <text:p text:style-name="P5">Air Support <text:span text:style-name="T2">2 Die against any one unit; no terrain protection.</text:span></text:p>
      <text:p text:style-name="P5">Let's Finish This<text:span text:style-name="T2"> Reroll any dice against any one target, except on confirmation rolls.</text:span></text:p>
      <text:p text:style-name="P5">Reserve Forces<text:span text:style-name="T2"> <text:s/>Bring one unit up to full strength.</text:span></text:p>
      <text:p text:style-name="P5">Desperate Stand <text:span text:style-name="T2">1 Infantry with only 1 figure left gets +2 Dice</text:span></text:p>
      <text:p text:style-name="P11"/>
      <text:p text:style-name="P11">Imperial</text:p>
      <text:p text:style-name="P5">Special Orders<text:span text:style-name="T2"> Instead of a regular card draw, choose one from the Discard Pile.</text:span></text:p>
      <text:p text:style-name="P5">Incursion<text:span text:style-name="T2"> 1 Infantry Unit may take a second turn immediately.</text:span></text:p>
      <text:p text:style-name="P5">Scout<text:span text:style-name="T2"> <text:s/>One extra Infantry unit may take a turn, but gain no Command Card bonuses.</text:span></text:p>
      <text:p text:style-name="P5">Final Assault<text:span text:style-name="T2"> Roll 2 dice against a retreating enemy unit.</text:span></text:p>
      <text:p text:style-name="P5">Rout<text:span text:style-name="T2"> One attacking unit ignores terrain prote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Elsden</meta:initial-creator>
    <meta:creation-date>2025-09-22T10:10:58.37</meta:creation-date>
    <dc:date>2025-09-24T05:37:40.71</dc:date>
    <dc:creator>Charles Elsden</dc:creator>
    <meta:editing-duration>PT3H3M49S</meta:editing-duration>
    <meta:editing-cycles>29</meta:editing-cycles>
    <meta:generator>OpenOffice/4.1.8$Win32 OpenOffice.org_project/418m3$Build-9803</meta:generator>
    <meta:printed-by>Charles Elsden</meta:printed-by>
    <meta:print-date>2025-09-22T13:11:17.62</meta:print-date>
    <meta:document-statistic meta:table-count="0" meta:image-count="0" meta:object-count="0" meta:page-count="2" meta:paragraph-count="62" meta:word-count="569" meta:character-count="3233"/>
  </office:meta>
</office:document-meta>
</file>